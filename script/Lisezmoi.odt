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6" style:master-page-name="MasterPage2" style:family="paragraph" style:name="P4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88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89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9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9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0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4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5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116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11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1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2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3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5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4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4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155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15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5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6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7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7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6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7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7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7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paragraph" style:name="P70">
      <style:paragraph-properties/>
      <style:text-properties fo:language="fr" style:language-complex="hi" fo:country="FR" style:country-complex="IN"/>
    </style:style>
    <style:style style:family="text" style:name="T175">
      <style:text-properties fo:language="fr" style:language-complex="hi" fo:country="FR" style:country-complex="IN"/>
    </style:style>
    <style:style style:family="text" style:name="T176">
      <style:text-properties fo:language="fr" style:language-complex="hi" fo:country="FR" style:country-complex="IN"/>
    </style:style>
    <style:style style:family="text" style:name="T177">
      <style:text-properties fo:language="fr" style:language-complex="hi" fo:country="FR" style:country-complex="IN"/>
    </style:style>
    <style:style style:family="paragraph" style:name="P71">
      <style:paragraph-properties/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78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79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0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paragraph" style:name="P72">
      <style:paragraph-properties/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1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2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3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paragraph" style:name="P73">
      <style:paragraph-properties/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4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5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6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7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88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paragraph" style:name="P74">
      <style:paragraph-properties/>
      <style:text-properties fo:language="fr" style:language-complex="hi" fo:country="FR" style:country-complex="IN"/>
    </style:style>
    <style:style style:family="text" style:name="T189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90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91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92">
      <style:text-properties fo:language="fr" style:language-complex="hi" fo:country="FR" style:country-complex="IN"/>
    </style:style>
    <style:style style:family="text" style:name="T193">
      <style:text-properties fo:language="fr" style:language-complex="hi" fo:country="FR" style:country-complex="IN"/>
    </style:style>
    <style:style style:family="paragraph" style:name="P75">
      <style:paragraph-properties/>
      <style:text-properties fo:language="fr" style:language-complex="hi" fo:country="FR" style:country-complex="IN"/>
    </style:style>
    <style:style style:family="text" style:name="T194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95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196">
      <style:text-properties fo:language="fr" fo:country="FR"/>
    </style:style>
    <style:style style:parent-style-name="736" style:family="paragraph" style:name="P7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9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9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19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7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7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7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0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5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216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21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1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2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8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3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4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1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252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25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5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9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6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7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8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0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29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0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1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1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2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38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339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34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4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2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5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68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369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37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7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7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8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39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6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387">
      <style:text-properties fo:color="#000000" fo:font-family="Liberation Mono" style:font-family-complex="Liberation Mono" fo:font-size="12pt" style:font-size-complex="12pt" fo:language="fr" style:language-complex="hi" fo:country="FR" style:country-complex="IN"/>
    </style:style>
    <style:style style:family="text" style:name="T38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4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8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4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4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4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39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44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45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46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0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694" style:family="paragraph" style:name="P147">
      <style:paragraph-properties fo:margin-left="0cm" fo:text-indent="0cm"/>
      <style:text-properties fo:language="fr" style:language-complex="hi" fo:country="FR" style:country-complex="IN"/>
    </style:style>
    <style:style style:family="text" style:name="T409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0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1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parent-style-name="694" style:family="paragraph" style:name="P148">
      <style:paragraph-properties fo:margin-left="0cm" fo:text-indent="0cm"/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2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3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4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5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6">
      <style:text-properties fo:language="fr" fo:country="FR"/>
    </style:style>
    <style:style style:family="paragraph" style:name="P149">
      <style:paragraph-properties fo:margin-left="0cm" fo:text-indent="0cm"/>
      <style:text-properties fo:language="fr" style:language-complex="hi" fo:country="FR" style:country-complex="IN"/>
    </style:style>
    <style:style style:family="text" style:name="T417">
      <style:text-properties fo:color="#000000" fo:font-family="Liberation Mono" style:font-family-complex="Liberation Mono" fo:font-size="10pt" style:font-size-complex="10pt" fo:language="fr" style:language-complex="fr" fo:country="FR" style:country-complex="FR"/>
    </style:style>
    <style:style style:family="text" style:name="T418">
      <style:text-properties fo:language="fr" fo:country="FR"/>
    </style:style>
    <style:style style:parent-style-name="736" style:family="paragraph" style:name="P150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1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1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51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2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3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4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52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5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6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7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parent-style-name="736" style:family="paragraph" style:name="P153">
      <style:paragraph-properties/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8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29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  <style:style style:family="text" style:name="T430">
      <style:text-properties fo:color="#000000" fo:font-family="Liberation Mono" style:font-family-complex="Liberation Mono" fo:font-size="10pt" style:font-size-complex="10pt" fo:language="fr" style:language-complex="hi" fo:country="FR" style:country-complex="IN"/>
    </style:style>
  </office:automatic-styles>
  <office:body>
    <office:text text:use-soft-page-breaks="true">
      <text:p text:style-name="P41"><text:span text:style-name="T88">Centralisation des commandes</text:span><text:span text:style-name="T89"/><text:span text:style-name="T90"/></text:p>
      <text:p text:style-name="P42"><text:span text:style-name="T91"/><text:span text:style-name="T92"/><text:span text:style-name="T93"/></text:p>
      <text:p text:style-name="P43"><text:span text:style-name="T94">Objectif</text:span><text:span text:style-name="T95"/><text:span text:style-name="T96"/></text:p>
      <text:p text:style-name="P44"><text:span text:style-name="T97"/><text:span text:style-name="T98"/><text:span text:style-name="T99"/></text:p>
      <text:p text:style-name="P45"><text:span text:style-name="T100">Ce programme permet de **regrouper automatiquement les commandes de plusieurs clients** à partir de fichiers Excel (`.xlsx`) situés dans le dossier `clients`, vers un fichier unique :</text:span><text:span text:style-name="T101"/><text:span text:style-name="T102"/></text:p>
      <text:p text:style-name="P46"><text:span text:style-name="T103">**`Commandes.xlsx`**</text:span><text:span text:style-name="T104"/><text:span text:style-name="T105"/></text:p>
      <text:p text:style-name="P47"><text:span text:style-name="T106"/><text:span text:style-name="T107"/><text:span text:style-name="T108"/></text:p>
      <text:p text:style-name="P48"><text:span text:style-name="T109">---</text:span><text:span text:style-name="T110"/><text:span text:style-name="T111"/></text:p>
      <text:p text:style-name="P49"><text:span text:style-name="T112"/><text:span text:style-name="T113"/><text:span text:style-name="T114"/></text:p>
      <text:p text:style-name="P50"><text:span text:style-name="T115">Fonctionnement général</text:span><text:span text:style-name="T116"/><text:span text:style-name="T117"/></text:p>
      <text:p text:style-name="P51"><text:span text:style-name="T118"/><text:span text:style-name="T119"/><text:span text:style-name="T120"/></text:p>
      <text:p text:style-name="P52"><text:span text:style-name="T121">Le script analyse chaque fichier client et :</text:span><text:span text:style-name="T122"/><text:span text:style-name="T123"/></text:p>
      <text:p text:style-name="P53"><text:span text:style-name="T124"/><text:span text:style-name="T125"/><text:span text:style-name="T126"/></text:p>
      <text:p text:style-name="P54"><text:span text:style-name="T127">1. **Recherche les produits** présents dans leurs tableaux</text:span><text:span text:style-name="T128"/><text:span text:style-name="T129"/></text:p>
      <text:p text:style-name="P55"><text:span text:style-name="T130">2. **Associe ces produits** avec ceux du fichier `Commandes.xlsx`</text:span><text:span text:style-name="T131"/><text:span text:style-name="T132"/></text:p>
      <text:p text:style-name="P56"><text:span text:style-name="T133">3. **Ajoute les quantités** dans les bonnes colonnes correspondant à chaque client</text:span><text:span text:style-name="T134"/><text:span text:style-name="T135"/></text:p>
      <text:p text:style-name="P57"><text:span text:style-name="T136"/><text:span text:style-name="T137"/><text:span text:style-name="T138"/></text:p>
      <text:p text:style-name="P58"><text:span text:style-name="T139">Le programme ne dépend pas de l’emplacement des produits dans les tableaux :</text:span><text:span text:style-name="T140"/><text:span text:style-name="T141"/></text:p>
      <text:p text:style-name="P59"><text:span text:style-name="T142">il parcourt toutes les cellules pour trouver les correspondances.</text:span><text:span text:style-name="T143"/><text:span text:style-name="T144"/></text:p>
      <text:p text:style-name="P60"><text:span text:style-name="T145"/><text:span text:style-name="T146"/><text:span text:style-name="T147"/></text:p>
      <text:p text:style-name="P61"><text:span text:style-name="T148">---</text:span><text:span text:style-name="T149"/><text:span text:style-name="T150"/></text:p>
      <text:p text:style-name="P62"><text:span text:style-name="T151"/><text:span text:style-name="T152"/><text:span text:style-name="T153"/></text:p>
      <text:p text:style-name="P63"><text:span text:style-name="T154">Gestion des produits</text:span><text:span text:style-name="T155"/><text:span text:style-name="T156"/></text:p>
      <text:p text:style-name="P64"><text:span text:style-name="T157"/><text:span text:style-name="T158"/><text:span text:style-name="T159"/></text:p>
      <text:p text:style-name="P65"><text:span text:style-name="T160">* Les produits sont identifiés **par leur nom**</text:span><text:span text:style-name="T161"/><text:span text:style-name="T162"/></text:p>
      <text:p text:style-name="P66"><text:span text:style-name="T163">* Il est donc **essentiel que les noms soient strictement identiques** entre les tableaux clients et central :</text:span><text:span text:style-name="T164"/><text:span text:style-name="T165"/></text:p>
      <text:p text:style-name="P67"><text:span text:style-name="T166"/><text:span text:style-name="T167"/><text:span text:style-name="T168"/></text:p>
      <text:p text:style-name="P68"><text:span text:style-name="T169"><text:s text:c="2"/>* même orthographe</text:span><text:span text:style-name="T170"/><text:span text:style-name="T171"/></text:p>
      <text:p text:style-name="P69"><text:span text:style-name="T172"><text:s text:c="2"/>* mêmes majuscules / minuscules</text:span><text:span text:style-name="T173"/><text:span text:style-name="T174"/></text:p>
      <text:p text:style-name="P70"><text:span text:style-name="T175"/><text:span text:style-name="T176"/><text:span text:style-name="T177"/></text:p>
      <text:p text:style-name="P71"><text:span text:style-name="T178"> !!! IL NE FAUT PAS QUE DEUX ARTICLES DIFFERENTS AIENT LE MEME NOM !!!</text:span><text:span text:style-name="T179"/><text:span text:style-name="T180"/></text:p>
      <text:p text:style-name="P72"><text:span text:style-name="T181"/><text:span text:style-name="T182"/><text:span text:style-name="T183"/></text:p>
      <text:p text:style-name="P73"><text:span text:style-name="T184">Exemple : préciser </text:span><text:span text:style-name="T185">CAISSETTE 5KG (sous vide) </text:span><text:span text:style-name="T186">BOEUF et</text:span><text:span text:style-name="T187"/><text:span text:style-name="T188"/></text:p>
      <text:p text:style-name="P74"><text:span text:style-name="T189"/><text:span text:style-name="T190">CAISSETTE 5KG (sous vide)</text:span><text:span text:style-name="T191"> VEAU</text:span><text:span text:style-name="T192"/><text:span text:style-name="T193"/></text:p>
      <text:p text:style-name="P75"><text:span text:style-name="T194"/><text:span text:style-name="T195"/><text:span text:style-name="T196"/></text:p>
      <text:p text:style-name="P76"><text:span text:style-name="T197"/><text:span text:style-name="T198"/><text:span text:style-name="T199"/></text:p>
      <text:p text:style-name="P77"><text:span text:style-name="T200">Vous pouvez ajouter de nouveaux produits dans les fichiers clients</text:span><text:span text:style-name="T201"/><text:span text:style-name="T202"/></text:p>
      <text:p text:style-name="P78"><text:span text:style-name="T203">à condition qu’ils existent aussi dans `Commandes.xlsx`</text:span><text:span text:style-name="T204"/><text:span text:style-name="T205"/></text:p>
      <text:p text:style-name="P79"><text:span text:style-name="T206"/><text:span text:style-name="T207"/><text:span text:style-name="T208"/></text:p>
      <text:p text:style-name="P80"><text:span text:style-name="T209">---</text:span><text:span text:style-name="T210"/><text:span text:style-name="T211"/></text:p>
      <text:p text:style-name="P81"><text:span text:style-name="T212"/><text:span text:style-name="T213"/><text:span text:style-name="T214"/></text:p>
      <text:p text:style-name="P82"><text:span text:style-name="T215">Gestion des clients</text:span><text:span text:style-name="T216"/><text:span text:style-name="T217"/></text:p>
      <text:p text:style-name="P83"><text:span text:style-name="T218"/><text:span text:style-name="T219"/><text:span text:style-name="T220"/></text:p>
      <text:p text:style-name="P84"><text:span text:style-name="T221">Chaque fichier client correspond à une colonne dans `Commandes.xlsx`.</text:span><text:span text:style-name="T222"/><text:span text:style-name="T223"/></text:p>
      <text:p text:style-name="P85"><text:span text:style-name="T224"/><text:span text:style-name="T225"/><text:span text:style-name="T226"/></text:p>
      <text:p text:style-name="P86"><text:span text:style-name="T227">Le programme fonctionne ainsi :</text:span><text:span text:style-name="T228"/><text:span text:style-name="T229"/></text:p>
      <text:p text:style-name="P87"><text:span text:style-name="T230"/><text:span text:style-name="T231"/><text:span text:style-name="T232"/></text:p>
      <text:p text:style-name="P88"><text:span text:style-name="T233">1. Il lit le nom du client dans la cellule **C1** du fichier client</text:span><text:span text:style-name="T234"/><text:span text:style-name="T235"/></text:p>
      <text:p text:style-name="P89"><text:span text:style-name="T236">2. Il cherche son **abréviation** dans la première ligne de `Commandes.xlsx`</text:span><text:span text:style-name="T237"/><text:span text:style-name="T238"/></text:p>
      <text:p text:style-name="P90"><text:span text:style-name="T239">3. Il utilise un fichier de correspondance pour faire le lien</text:span><text:span text:style-name="T240"/><text:span text:style-name="T241"/></text:p>
      <text:p text:style-name="P91"><text:span text:style-name="T242"/><text:span text:style-name="T243"/><text:span text:style-name="T244"/></text:p>
      <text:p text:style-name="P92"><text:span text:style-name="T245">---</text:span><text:span text:style-name="T246"/><text:span text:style-name="T247"/></text:p>
      <text:p text:style-name="P93"><text:span text:style-name="T248"/><text:span text:style-name="T249"/><text:span text:style-name="T250"/></text:p>
      <text:p text:style-name="P94"><text:span text:style-name="T251">Fichier de correspondance</text:span><text:span text:style-name="T252"/><text:span text:style-name="T253"/></text:p>
      <text:p text:style-name="P95"><text:span text:style-name="T254"/><text:span text:style-name="T255"/><text:span text:style-name="T256"/></text:p>
      <text:p text:style-name="P96"><text:span text:style-name="T257">Le lien entre :</text:span><text:span text:style-name="T258"/><text:span text:style-name="T259"/></text:p>
      <text:p text:style-name="P97"><text:span text:style-name="T260"/><text:span text:style-name="T261"/><text:span text:style-name="T262"/></text:p>
      <text:p text:style-name="P98"><text:span text:style-name="T263">* nom complet du client</text:span><text:span text:style-name="T264"/><text:span text:style-name="T265"/></text:p>
      <text:p text:style-name="P99"><text:span text:style-name="T266">* abréviation utilisée dans `Commandes.xlsx`</text:span><text:span text:style-name="T267"/><text:span text:style-name="T268"/></text:p>
      <text:p text:style-name="P100"><text:span text:style-name="T269"/><text:span text:style-name="T270"/><text:span text:style-name="T271"/></text:p>
      <text:p text:style-name="P101"><text:span text:style-name="T272">est défini dans le fichier :</text:span><text:span text:style-name="T273"/><text:span text:style-name="T274"/></text:p>
      <text:p text:style-name="P102"><text:span text:style-name="T275"/><text:span text:style-name="T276"/><text:span text:style-name="T277"/></text:p>
      <text:p text:style-name="P103"><text:span text:style-name="T278">```</text:span><text:span text:style-name="T279"/><text:span text:style-name="T280"/></text:p>
      <text:p text:style-name="P104"><text:span text:style-name="T281">script/Correspondance_clients.csv</text:span><text:span text:style-name="T282"/><text:span text:style-name="T283"/></text:p>
      <text:p text:style-name="P105"><text:span text:style-name="T284">```</text:span><text:span text:style-name="T285"/><text:span text:style-name="T286"/></text:p>
      <text:p text:style-name="P106"><text:span text:style-name="T287"/><text:span text:style-name="T288"/><text:span text:style-name="T289"/></text:p>
      <text:p text:style-name="P107"><text:span text:style-name="T290">Vous pouvez :</text:span><text:span text:style-name="T291"/><text:span text:style-name="T292"/></text:p>
      <text:p text:style-name="P108"><text:span text:style-name="T293"/><text:span text:style-name="T294"/><text:span text:style-name="T295"/></text:p>
      <text:p text:style-name="P109"><text:span text:style-name="T296">* Ajouter un client</text:span><text:span text:style-name="T297"/><text:span text:style-name="T298"/></text:p>
      <text:p text:style-name="P110"><text:span text:style-name="T299">* Modifier un nom ou une abréviation</text:span><text:span text:style-name="T300"/><text:span text:style-name="T301"/></text:p>
      <text:p text:style-name="P111"><text:span text:style-name="T302">* Supprimer un client</text:span><text:span text:style-name="T303"/><text:span text:style-name="T304"/></text:p>
      <text:p text:style-name="P112"><text:span text:style-name="T305"/><text:span text:style-name="T306"/><text:span text:style-name="T307"/></text:p>
      <text:p text:style-name="P113"><text:span text:style-name="T308">Ce fichier peut être modifié simplement avec le Bloc-notes.</text:span><text:span text:style-name="T309"/><text:span text:style-name="T310"/></text:p>
      <text:p text:style-name="P114"><text:span text:style-name="T311"/><text:span text:style-name="T312"/><text:span text:style-name="T313"/></text:p>
      <text:p text:style-name="P115"><text:span text:style-name="T314">---</text:span><text:span text:style-name="T315"/><text:span text:style-name="T316"/></text:p>
      <text:p text:style-name="P116"><text:span text:style-name="T317"/><text:span text:style-name="T318"/><text:span text:style-name="T319"/></text:p>
      <text:p text:style-name="P117"><text:span text:style-name="T320">PROTECTION</text:span><text:span text:style-name="T321"/><text:span text:style-name="T322"/></text:p>
      <text:p text:style-name="P118"><text:span text:style-name="T323"/><text:span text:style-name="T324"/><text:span text:style-name="T325"/></text:p>
      <text:p text:style-name="P119"><text:span text:style-name="T326">Les cellules (en dehors des cellules « quantité » que le client peut modifier) des tableaux clients sont automatiquement protégées en écriture.</text:span><text:span text:style-name="T327"/><text:span text:style-name="T328"/></text:p>
      <text:p text:style-name="P120"><text:span text:style-name="T329"/><text:span text:style-name="T330"/><text:span text:style-name="T331"/></text:p>
      <text:p text:style-name="P121"><text:span text:style-name="T332">---</text:span><text:span text:style-name="T333"/><text:span text:style-name="T334"/></text:p>
      <text:p text:style-name="P122"><text:span text:style-name="T335"/><text:span text:style-name="T336"/><text:span text:style-name="T337"/></text:p>
      <text:p text:style-name="P123"><text:span text:style-name="T338">Points importants</text:span><text:span text:style-name="T339"/><text:span text:style-name="T340"/></text:p>
      <text:p text:style-name="P124"><text:span text:style-name="T341"/><text:span text:style-name="T342"/><text:span text:style-name="T343"/></text:p>
      <text:p text:style-name="P125"><text:span text:style-name="T344">* Les noms de produits doivent être **strictement identiques** entre tableaux client et central</text:span><text:span text:style-name="T345"/><text:span text:style-name="T346"/></text:p>
      <text:p text:style-name="P126"><text:span text:style-name="T347">* Le nom du client doit être présent en **cellule C1**</text:span><text:span text:style-name="T348"/><text:span text:style-name="T349"/></text:p>
      <text:p text:style-name="P127"><text:span text:style-name="T350">* Le fichier de correspondance doit être à jour</text:span><text:span text:style-name="T351"/><text:span text:style-name="T352"/></text:p>
      <text:p text:style-name="P128"><text:span text:style-name="T353">* Les fichiers Excel doivent être fermés pendant le traitement</text:span><text:span text:style-name="T354"/><text:span text:style-name="T355"/></text:p>
      <text:p text:style-name="P129"><text:span text:style-name="T356"/><text:span text:style-name="T357"/><text:span text:style-name="T358"/></text:p>
      <text:p text:style-name="P130"><text:span text:style-name="T359">---</text:span><text:span text:style-name="T360"/><text:span text:style-name="T361"/></text:p>
      <text:p text:style-name="P131"><text:span text:style-name="T362"/><text:span text:style-name="T363"/><text:span text:style-name="T364"/></text:p>
      <text:p text:style-name="P132"><text:span text:style-name="T365"/><text:span text:style-name="T366"/><text:span text:style-name="T367"/></text:p>
      <text:p text:style-name="P133"><text:span text:style-name="T368">Fichier de configuration</text:span><text:span text:style-name="T369"/><text:span text:style-name="T370"/></text:p>
      <text:p text:style-name="P134"><text:span text:style-name="T371"/><text:span text:style-name="T372"/><text:span text:style-name="T373"/></text:p>
      <text:p text:style-name="P135"><text:span text:style-name="T374">Le fichier script\config.ini permet de modifier certains comportements du script</text:span><text:span text:style-name="T375"/><text:span text:style-name="T376"/></text:p>
      <text:p text:style-name="P136"><text:span text:style-name="T377"/><text:span text:style-name="T378"/><text:span text:style-name="T379"/></text:p>
      <text:p text:style-name="P137"><text:span text:style-name="T380">---</text:span><text:span text:style-name="T381"/><text:span text:style-name="T382"/></text:p>
      <text:p text:style-name="P138"><text:span text:style-name="T383"/><text:span text:style-name="T384"/><text:span text:style-name="T385"/></text:p>
      <text:p text:style-name="P139"><text:span text:style-name="T386">En cas de problème</text:span><text:span text:style-name="T387"/><text:span text:style-name="T388"/></text:p>
      <text:p text:style-name="P140"><text:span text:style-name="T389"/><text:span text:style-name="T390"/><text:span text:style-name="T391"/></text:p>
      <text:p text:style-name="P141"><text:span text:style-name="T392">Si un client ou un produit n’apparaît pas :</text:span><text:span text:style-name="T393"/><text:span text:style-name="T394"/></text:p>
      <text:p text:style-name="P142"><text:span text:style-name="T395"/><text:span text:style-name="T396"/><text:span text:style-name="T397"/></text:p>
      <text:p text:style-name="P143"><text:span text:style-name="T398">* Vérifier l’orthographe</text:span><text:span text:style-name="T399"/><text:span text:style-name="T400"/></text:p>
      <text:p text:style-name="P144"><text:span text:style-name="T401">* Vérifier le fichier `Correspondance_clients.csv`</text:span><text:span text:style-name="T402"/><text:span text:style-name="T403"/></text:p>
      <text:p text:style-name="P145"><text:span text:style-name="T404">* Vérifier que le fichier client est bien dans le dossier `clients`</text:span><text:span text:style-name="T405"/><text:span text:style-name="T406"/></text:p>
      <text:p text:style-name="P146"><text:span text:style-name="T407">* Contactez zoso85@hotmail.fr en cas de problème</text:span><text:span text:style-name="T408"/></text:p>
      <text:p text:style-name="P147"><text:span text:style-name="T409"/><text:span text:style-name="T410"/><text:span text:style-name="T411"/></text:p>
      <text:p text:style-name="P148"><text:span text:style-name="T412">Sources disponible à </text:span><text:span text:style-name="T413">https://github.com/julien-correard/centralisation_commandes</text:span><text:span text:style-name="T414"/><text:span text:style-name="T415"/><text:span text:style-name="T416"/></text:p>
      <text:p text:style-name="P149"><text:span text:style-name="T417"/><text:span text:style-name="T418"/></text:p>
      <text:p text:style-name="P150"><text:span text:style-name="T419"/><text:span text:style-name="T420"/><text:span text:style-name="T421"/></text:p>
      <text:p text:style-name="P151"><text:span text:style-name="T422">---</text:span><text:span text:style-name="T423"/><text:span text:style-name="T424"/></text:p>
      <text:p text:style-name="P152"><text:span text:style-name="T425"/><text:span text:style-name="T426"/><text:span text:style-name="T427"/></text:p>
      <text:p text:style-name="P153"><text:span text:style-name="T428"/><text:span text:style-name="T429"/><text:span text:style-name="T4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class="default" style:display-name="Normal" style:family="paragraph" style:name="667">
      <style:paragraph-properties/>
      <style:text-properties/>
    </style:style>
    <style:style style:parent-style-name="667" style:display-name="Heading 1" style:family="paragraph" style:name="668">
      <style:paragraph-properties fo:margin-top="18pt" fo:margin-bottom="4pt"/>
      <style:text-properties fo:color="#0f4761" fo:font-family="Arial" style:font-family-complex="Arial" fo:font-size="20pt" style:font-size-complex="20pt"/>
    </style:style>
    <style:style style:parent-style-name="667" style:display-name="Heading 2" style:family="paragraph" style:name="669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667" style:display-name="Heading 3" style:family="paragraph" style:name="670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67" style:display-name="Heading 4" style:family="paragraph" style:name="671">
      <style:paragraph-properties fo:margin-top="4pt" fo:margin-bottom="2pt"/>
      <style:text-properties fo:color="#0f4761" fo:font-family="Arial" style:font-family-complex="Arial" fo:font-style="italic"/>
    </style:style>
    <style:style style:parent-style-name="667" style:display-name="Heading 5" style:family="paragraph" style:name="672">
      <style:paragraph-properties fo:margin-top="4pt" fo:margin-bottom="2pt"/>
      <style:text-properties fo:color="#0f4761" fo:font-family="Arial" style:font-family-complex="Arial"/>
    </style:style>
    <style:style style:parent-style-name="667" style:display-name="Heading 6" style:family="paragraph" style:name="673">
      <style:paragraph-properties fo:margin-top="2pt" fo:margin-bottom="0pt"/>
      <style:text-properties fo:color="#595959" fo:font-family="Arial" style:font-family-complex="Arial" fo:font-style="italic"/>
    </style:style>
    <style:style style:parent-style-name="667" style:display-name="Heading 7" style:family="paragraph" style:name="674">
      <style:paragraph-properties fo:margin-top="2pt" fo:margin-bottom="0pt"/>
      <style:text-properties fo:color="#595959" fo:font-family="Arial" style:font-family-complex="Arial"/>
    </style:style>
    <style:style style:parent-style-name="667" style:display-name="Heading 8" style:family="paragraph" style:name="675">
      <style:paragraph-properties fo:margin-bottom="0pt"/>
      <style:text-properties fo:color="#272727" fo:font-family="Arial" style:font-family-complex="Arial" fo:font-style="italic"/>
    </style:style>
    <style:style style:parent-style-name="667" style:display-name="Heading 9" style:family="paragraph" style:name="67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7">
      <style:paragraph-properties/>
    </style:style>
    <style:style style:parent-style-name="677" style:display-name="Heading 1 Char" style:family="text" style:name="678">
      <style:paragraph-properties/>
      <style:text-properties fo:color="#0f4761" fo:font-family="Arial" style:font-family-complex="Arial" fo:font-size="20pt" style:font-size-complex="20pt"/>
    </style:style>
    <style:style style:parent-style-name="677" style:display-name="Heading 2 Char" style:family="text" style:name="679">
      <style:paragraph-properties/>
      <style:text-properties fo:color="#0f4761" fo:font-family="Arial" style:font-family-complex="Arial" fo:font-size="16pt" style:font-size-complex="16pt"/>
    </style:style>
    <style:style style:parent-style-name="677" style:display-name="Heading 3 Char" style:family="text" style:name="680">
      <style:paragraph-properties/>
      <style:text-properties fo:color="#0f4761" fo:font-family="Arial" style:font-family-complex="Arial" fo:font-size="14pt" style:font-size-complex="14pt"/>
    </style:style>
    <style:style style:parent-style-name="677" style:display-name="Heading 4 Char" style:family="text" style:name="681">
      <style:paragraph-properties/>
      <style:text-properties fo:color="#0f4761" fo:font-family="Arial" style:font-family-complex="Arial" fo:font-style="italic"/>
    </style:style>
    <style:style style:parent-style-name="677" style:display-name="Heading 5 Char" style:family="text" style:name="682">
      <style:paragraph-properties/>
      <style:text-properties fo:color="#0f4761" fo:font-family="Arial" style:font-family-complex="Arial"/>
    </style:style>
    <style:style style:parent-style-name="677" style:display-name="Heading 6 Char" style:family="text" style:name="683">
      <style:paragraph-properties/>
      <style:text-properties fo:color="#595959" fo:font-family="Arial" style:font-family-complex="Arial" fo:font-style="italic"/>
    </style:style>
    <style:style style:parent-style-name="677" style:display-name="Heading 7 Char" style:family="text" style:name="684">
      <style:paragraph-properties/>
      <style:text-properties fo:color="#595959" fo:font-family="Arial" style:font-family-complex="Arial"/>
    </style:style>
    <style:style style:parent-style-name="677" style:display-name="Heading 8 Char" style:family="text" style:name="685">
      <style:paragraph-properties/>
      <style:text-properties fo:color="#272727" fo:font-family="Arial" style:font-family-complex="Arial" fo:font-style="italic"/>
    </style:style>
    <style:style style:parent-style-name="677" style:display-name="Heading 9 Char" style:family="text" style:name="686">
      <style:paragraph-properties/>
      <style:text-properties fo:color="#272727" fo:font-family="Arial" style:font-family-complex="Arial" fo:font-style="italic"/>
    </style:style>
    <style:style style:parent-style-name="667" style:display-name="Title" style:family="paragraph" style:name="687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7" style:display-name="Title Char" style:family="text" style:name="688">
      <style:paragraph-properties/>
      <style:text-properties fo:font-family="Arial" style:font-family-complex="Arial" fo:font-size="28pt" style:font-size-complex="28pt" fo:letter-spacing="-0.5pt"/>
    </style:style>
    <style:style style:parent-style-name="667" style:display-name="Subtitle" style:family="paragraph" style:name="689">
      <style:paragraph-properties/>
      <style:text-properties fo:color="#595959" fo:font-size="14pt" style:font-size-complex="14pt" fo:letter-spacing="0.75pt"/>
    </style:style>
    <style:style style:parent-style-name="677" style:display-name="Subtitle Char" style:family="text" style:name="690">
      <style:paragraph-properties/>
      <style:text-properties fo:color="#595959" fo:font-size="14pt" style:font-size-complex="14pt" fo:letter-spacing="0.75pt"/>
    </style:style>
    <style:style style:parent-style-name="667" style:display-name="Quote" style:family="paragraph" style:name="691">
      <style:paragraph-properties fo:text-align="center" fo:margin-top="8pt"/>
      <style:text-properties fo:color="#404040" fo:font-style="italic"/>
    </style:style>
    <style:style style:parent-style-name="677" style:display-name="Quote Char" style:family="text" style:name="692">
      <style:paragraph-properties/>
      <style:text-properties fo:color="#404040" fo:font-style="italic"/>
    </style:style>
    <style:style style:parent-style-name="667" style:display-name="List Paragraph" style:family="paragraph" style:name="693">
      <style:paragraph-properties fo:margin-left="1.27cm" fo:margin-right="0cm" fo:text-indent="0cm"/>
    </style:style>
    <style:style style:parent-style-name="677" style:display-name="Intense Emphasis" style:family="text" style:name="694">
      <style:paragraph-properties/>
      <style:text-properties fo:color="#0f4761" fo:font-style="italic"/>
    </style:style>
    <style:style style:parent-style-name="667" style:display-name="Intense Quote" style:family="paragraph" style:name="695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7" style:display-name="Intense Quote Char" style:family="text" style:name="696">
      <style:paragraph-properties/>
      <style:text-properties fo:color="#0f4761" fo:font-style="italic"/>
    </style:style>
    <style:style style:parent-style-name="677" style:display-name="Intense Reference" style:family="text" style:name="697">
      <style:paragraph-properties/>
      <style:text-properties fo:font-variant="small-caps" fo:color="#0f4761" fo:letter-spacing="0.25pt" fo:font-weight="bold"/>
    </style:style>
    <style:style style:parent-style-name="667" style:display-name="No Spacing" style:family="paragraph" style:name="698">
      <style:paragraph-properties fo:line-height="100%" fo:margin-bottom="0pt"/>
    </style:style>
    <style:style style:parent-style-name="677" style:display-name="Subtle Emphasis" style:family="text" style:name="699">
      <style:paragraph-properties/>
      <style:text-properties fo:color="#404040" fo:font-style="italic"/>
    </style:style>
    <style:style style:parent-style-name="677" style:display-name="Emphasis" style:family="text" style:name="700">
      <style:paragraph-properties/>
      <style:text-properties fo:font-style="italic"/>
    </style:style>
    <style:style style:parent-style-name="677" style:display-name="Strong" style:family="text" style:name="701">
      <style:paragraph-properties/>
      <style:text-properties fo:font-weight="bold"/>
    </style:style>
    <style:style style:parent-style-name="677" style:display-name="Subtle Reference" style:family="text" style:name="702">
      <style:paragraph-properties/>
      <style:text-properties fo:font-variant="small-caps" fo:color="#5a5a5a"/>
    </style:style>
    <style:style style:parent-style-name="677" style:display-name="Book Title" style:family="text" style:name="703">
      <style:paragraph-properties/>
      <style:text-properties fo:letter-spacing="0.25pt" fo:font-style="italic" fo:font-weight="bold"/>
    </style:style>
    <style:style style:parent-style-name="667" style:display-name="Header" style:family="paragraph" style:name="70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Header Char" style:family="text" style:name="705">
      <style:paragraph-properties/>
    </style:style>
    <style:style style:parent-style-name="667" style:display-name="Footer" style:family="paragraph" style:name="70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Footer Char" style:family="text" style:name="707">
      <style:paragraph-properties/>
    </style:style>
    <style:style style:parent-style-name="667" style:display-name="footnote text" style:family="paragraph" style:name="708">
      <style:paragraph-properties fo:line-height="100%" fo:margin-bottom="0pt"/>
      <style:text-properties fo:font-size="10pt" style:font-size-complex="10pt"/>
    </style:style>
    <style:style style:parent-style-name="677" style:display-name="Footnote Text Char" style:family="text" style:name="709">
      <style:paragraph-properties/>
      <style:text-properties fo:font-size="10pt" style:font-size-complex="10pt"/>
    </style:style>
    <style:style style:parent-style-name="677" style:display-name="footnote reference" style:family="text" style:name="710">
      <style:paragraph-properties/>
      <style:text-properties style:text-position="super 58%"/>
    </style:style>
    <style:style style:parent-style-name="667" style:display-name="endnote text" style:family="paragraph" style:name="711">
      <style:paragraph-properties fo:line-height="100%" fo:margin-bottom="0pt"/>
      <style:text-properties fo:font-size="10pt" style:font-size-complex="10pt"/>
    </style:style>
    <style:style style:parent-style-name="677" style:display-name="Endnote Text Char" style:family="text" style:name="712">
      <style:paragraph-properties/>
      <style:text-properties fo:font-size="10pt" style:font-size-complex="10pt"/>
    </style:style>
    <style:style style:parent-style-name="677" style:display-name="endnote reference" style:family="text" style:name="713">
      <style:paragraph-properties/>
      <style:text-properties style:text-position="super 58%"/>
    </style:style>
    <style:style style:parent-style-name="677" style:display-name="Hyper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7" style:display-name="Internet 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7" style:display-name="FollowedHyperlink" style:family="text" style:name="716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7" style:display-name="toc 1" style:family="paragraph" style:name="717">
      <style:paragraph-properties fo:margin-bottom="5pt"/>
    </style:style>
    <style:style style:parent-style-name="667" style:display-name="toc 2" style:family="paragraph" style:name="718">
      <style:paragraph-properties fo:margin-left="0.3881cm" fo:margin-right="0cm" fo:text-indent="0cm" fo:margin-bottom="5pt"/>
    </style:style>
    <style:style style:parent-style-name="667" style:display-name="toc 3" style:family="paragraph" style:name="719">
      <style:paragraph-properties fo:margin-left="0.7762cm" fo:margin-right="0cm" fo:text-indent="0cm" fo:margin-bottom="5pt"/>
    </style:style>
    <style:style style:parent-style-name="667" style:display-name="toc 4" style:family="paragraph" style:name="720">
      <style:paragraph-properties fo:margin-left="1.164cm" fo:margin-right="0cm" fo:text-indent="0cm" fo:margin-bottom="5pt"/>
    </style:style>
    <style:style style:parent-style-name="667" style:display-name="toc 5" style:family="paragraph" style:name="721">
      <style:paragraph-properties fo:margin-left="1.552cm" fo:margin-right="0cm" fo:text-indent="0cm" fo:margin-bottom="5pt"/>
    </style:style>
    <style:style style:parent-style-name="667" style:display-name="toc 6" style:family="paragraph" style:name="722">
      <style:paragraph-properties fo:margin-left="1.94cm" fo:margin-right="0cm" fo:text-indent="0cm" fo:margin-bottom="5pt"/>
    </style:style>
    <style:style style:parent-style-name="667" style:display-name="toc 7" style:family="paragraph" style:name="723">
      <style:paragraph-properties fo:margin-left="2.328cm" fo:margin-right="0cm" fo:text-indent="0cm" fo:margin-bottom="5pt"/>
    </style:style>
    <style:style style:parent-style-name="667" style:display-name="toc 8" style:family="paragraph" style:name="724">
      <style:paragraph-properties fo:margin-left="2.717cm" fo:margin-right="0cm" fo:text-indent="0cm" fo:margin-bottom="5pt"/>
    </style:style>
    <style:style style:parent-style-name="667" style:display-name="toc 9" style:family="paragraph" style:name="725">
      <style:paragraph-properties fo:margin-left="3.105cm" fo:margin-right="0cm" fo:text-indent="0cm" fo:margin-bottom="5pt"/>
    </style:style>
    <style:style style:parent-style-name="677" style:display-name="Placeholder Text" style:family="text" style:name="726">
      <style:paragraph-properties/>
      <style:text-properties fo:color="#666666"/>
    </style:style>
    <style:style style:parent-style-name="667" style:display-name="TOC Heading" style:family="paragraph" style:name="727">
      <style:paragraph-properties/>
    </style:style>
    <style:style style:parent-style-name="667" style:display-name="table of figures" style:family="paragraph" style:name="728">
      <style:paragraph-properties fo:margin-bottom="0pt"/>
    </style:style>
    <style:style style:parent-style-name="667" style:display-name="DStyle_paragraph" style:family="paragraph" style:name="729">
      <style:paragraph-properties/>
      <style:text-properties fo:color="#000000" fo:font-family="Liberation Serif" style:font-family-complex="Liberation Serif" fo:font-size="12pt" style:font-size-complex="12pt" fo:language="fr" style:language-complex="hi" fo:country="FR" style:country-complex="IN"/>
    </style:style>
    <style:style style:parent-style-name="729" style:display-name="Standard" style:family="paragraph" style:name="730">
      <style:paragraph-properties/>
      <style:text-properties/>
    </style:style>
    <style:style style:parent-style-name="730" style:display-name="Heading" style:family="paragraph" style:name="731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30" style:display-name="Text body" style:family="paragraph" style:name="732">
      <style:paragraph-properties fo:line-height="115%" fo:margin-top="0pt" fo:margin-bottom="7pt"/>
    </style:style>
    <style:style style:parent-style-name="732" style:display-name="List" style:family="paragraph" style:name="733">
      <style:paragraph-properties/>
    </style:style>
    <style:style style:parent-style-name="730" style:display-name="Caption" style:family="paragraph" style:name="734">
      <style:paragraph-properties fo:margin-top="6pt" fo:margin-bottom="6pt"/>
      <style:text-properties fo:font-size="12pt" style:font-size-complex="12pt" fo:font-style="italic"/>
    </style:style>
    <style:style style:parent-style-name="730" style:display-name="Index" style:family="paragraph" style:name="735">
      <style:paragraph-properties/>
    </style:style>
    <style:style style:parent-style-name="730" style:display-name="Preformatted Text" style:family="paragraph" style:name="736">
      <style:paragraph-properties fo:margin-top="0pt" fo:margin-bottom="0pt"/>
      <style:text-properties fo:font-family="Liberation Mono" style:font-family-complex="Liberation Mono" fo:font-size="10pt" style:font-size-complex="10pt"/>
    </style:style>
    <style:style style:parent-style-name="667" style:display-name="T1" style:family="text" style:name="737">
      <style:paragraph-properties/>
    </style:style>
    <style:style style:parent-style-name="667" style:display-name="T2" style:family="text" style:name="738">
      <style:paragraph-properties/>
    </style:style>
    <style:style style:parent-style-name="667" style:display-name="T3" style:family="text" style:name="739">
      <style:paragraph-properties/>
    </style:style>
    <style:style style:parent-style-name="667" style:display-name="T4" style:family="text" style:name="740">
      <style:paragraph-properties/>
    </style:style>
    <style:style style:parent-style-name="667" style:display-name="T5" style:family="text" style:name="741">
      <style:paragraph-properties/>
    </style:style>
    <style:style style:parent-style-name="667" style:display-name="T6" style:family="text" style:name="742">
      <style:paragraph-properties/>
    </style:style>
    <style:style style:parent-style-name="667" style:display-name="T7" style:family="text" style:name="743">
      <style:paragraph-properties/>
    </style:style>
    <style:style style:parent-style-name="667" style:display-name="T8" style:family="text" style:name="744">
      <style:paragraph-properties/>
    </style:style>
    <style:style style:parent-style-name="667" style:display-name="T9" style:family="text" style:name="745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