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1193ac" officeooo:paragraph-rsid="001193ac" style:font-size-asian="12pt" style:font-size-complex="12pt"/>
    </style:style>
    <style:style style:name="P3" style:family="paragraph" style:parent-style-name="Preformatted_20_Text">
      <style:text-properties officeooo:rsid="001193ac" officeooo:paragraph-rsid="00119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alisation des commandes</text:p>
      <text:p text:style-name="Preformatted_20_Text"/>
      <text:p text:style-name="Preformatted_20_Text">Objectif</text:p>
      <text:p text:style-name="Preformatted_20_Text"/>
      <text:p text:style-name="Preformatted_20_Text">Ce programme permet de **regrouper automatiquement les commandes de plusieurs clients** à partir de fichiers Excel (`.xlsx`) situés dans le dossier `clients`, vers un fichier unique :</text:p>
      <text:p text:style-name="Preformatted_20_Text">**`Commandes.xlsx`**</text:p>
      <text:p text:style-name="Preformatted_20_Text"/>
      <text:p text:style-name="Preformatted_20_Text">---</text:p>
      <text:p text:style-name="Preformatted_20_Text"/>
      <text:p text:style-name="P1">Fonctionnement général</text:p>
      <text:p text:style-name="Preformatted_20_Text"/>
      <text:p text:style-name="Preformatted_20_Text">Le script analyse chaque fichier client et :</text:p>
      <text:p text:style-name="Preformatted_20_Text"/>
      <text:p text:style-name="Preformatted_20_Text">1. **Recherche les produits** présents dans leurs tableaux</text:p>
      <text:p text:style-name="Preformatted_20_Text">2. **Associe ces produits** avec ceux du fichier `Commandes.xlsx`</text:p>
      <text:p text:style-name="Preformatted_20_Text">3. **Ajoute les quantités** dans les bonnes colonnes correspondant à chaque client</text:p>
      <text:p text:style-name="Preformatted_20_Text"/>
      <text:p text:style-name="Preformatted_20_Text">Le programme ne dépend pas de l’emplacement des produits dans les tableaux :</text:p>
      <text:p text:style-name="Preformatted_20_Text">il parcourt toutes les cellules pour trouver les correspondances.</text:p>
      <text:p text:style-name="Preformatted_20_Text"/>
      <text:p text:style-name="Preformatted_20_Text">---</text:p>
      <text:p text:style-name="Preformatted_20_Text"/>
      <text:p text:style-name="P1">Gestion des produits</text:p>
      <text:p text:style-name="Preformatted_20_Text"/>
      <text:p text:style-name="Preformatted_20_Text">* Les produits sont identifiés **par leur nom**</text:p>
      <text:p text:style-name="Preformatted_20_Text">* Il est donc **essentiel que les noms soient strictement identiques** :</text:p>
      <text:p text:style-name="Preformatted_20_Text"/>
      <text:p text:style-name="Preformatted_20_Text"><text:s text:c="2"/>* même orthographe</text:p>
      <text:p text:style-name="Preformatted_20_Text"><text:s text:c="2"/>* mêmes majuscules / minuscules</text:p>
      <text:p text:style-name="Preformatted_20_Text"/>
      <text:p text:style-name="Preformatted_20_Text">Vous pouvez ajouter de nouveaux produits dans les fichiers clients</text:p>
      <text:p text:style-name="Preformatted_20_Text">à condition qu’ils existent aussi dans `Commandes.xlsx`</text:p>
      <text:p text:style-name="Preformatted_20_Text"/>
      <text:p text:style-name="Preformatted_20_Text">---</text:p>
      <text:p text:style-name="Preformatted_20_Text"/>
      <text:p text:style-name="P1">Gestion des clients</text:p>
      <text:p text:style-name="Preformatted_20_Text"/>
      <text:p text:style-name="Preformatted_20_Text">Chaque fichier client correspond à une colonne dans `Commandes.xlsx`.</text:p>
      <text:p text:style-name="Preformatted_20_Text"/>
      <text:p text:style-name="Preformatted_20_Text">Le programme fonctionne ainsi :</text:p>
      <text:p text:style-name="Preformatted_20_Text"/>
      <text:p text:style-name="Preformatted_20_Text">1. Il lit le nom du client dans la cellule **C1** du fichier client</text:p>
      <text:p text:style-name="Preformatted_20_Text">2. Il cherche son **abréviation** dans la première ligne de `Commandes.xlsx`</text:p>
      <text:p text:style-name="Preformatted_20_Text">3. Il utilise un fichier de correspondance pour faire le lien</text:p>
      <text:p text:style-name="Preformatted_20_Text"/>
      <text:p text:style-name="Preformatted_20_Text">---</text:p>
      <text:p text:style-name="Preformatted_20_Text"/>
      <text:p text:style-name="P1">Fichier de correspondance</text:p>
      <text:p text:style-name="Preformatted_20_Text"/>
      <text:p text:style-name="Preformatted_20_Text">Le lien entre :</text:p>
      <text:p text:style-name="Preformatted_20_Text"/>
      <text:p text:style-name="Preformatted_20_Text">* nom complet du client</text:p>
      <text:p text:style-name="Preformatted_20_Text">* abréviation utilisée dans `Commandes.xlsx`</text:p>
      <text:p text:style-name="Preformatted_20_Text"/>
      <text:p text:style-name="Preformatted_20_Text">est défini dans le fichier :</text:p>
      <text:p text:style-name="Preformatted_20_Text"/>
      <text:p text:style-name="Preformatted_20_Text">```</text:p>
      <text:p text:style-name="Preformatted_20_Text">script/Correspondance_clients.csv</text:p>
      <text:p text:style-name="Preformatted_20_Text">```</text:p>
      <text:p text:style-name="Preformatted_20_Text"/>
      <text:p text:style-name="Preformatted_20_Text"><text:soft-page-break/>Vous pouvez :</text:p>
      <text:p text:style-name="Preformatted_20_Text"/>
      <text:p text:style-name="Preformatted_20_Text">* Ajouter un client</text:p>
      <text:p text:style-name="Preformatted_20_Text">* Modifier un nom ou une abréviation</text:p>
      <text:p text:style-name="Preformatted_20_Text">* Supprimer un client</text:p>
      <text:p text:style-name="Preformatted_20_Text"/>
      <text:p text:style-name="Preformatted_20_Text">Ce fichier peut être modifié simplement avec le Bloc-notes.</text:p>
      <text:p text:style-name="Preformatted_20_Text"/>
      <text:p text:style-name="Preformatted_20_Text">---</text:p>
      <text:p text:style-name="Preformatted_20_Text"/>
      <text:p text:style-name="P1">Utilisation</text:p>
      <text:p text:style-name="Preformatted_20_Text"/>
      <text:p text:style-name="Preformatted_20_Text">1. Déposer les fichiers clients (`.xlsx`) dans le dossier `clients`</text:p>
      <text:p text:style-name="Preformatted_20_Text">2. Vérifier que les noms produits correspondent</text:p>
      <text:p text:style-name="Preformatted_20_Text">3. Lancer le script Python</text:p>
      <text:p text:style-name="Preformatted_20_Text">4. Le fichier `Commandes.xlsx` est automatiquement mis à jour</text:p>
      <text:p text:style-name="Preformatted_20_Text"/>
      <text:p text:style-name="Preformatted_20_Text">---</text:p>
      <text:p text:style-name="Preformatted_20_Text"/>
      <text:p text:style-name="P1">Points importants</text:p>
      <text:p text:style-name="Preformatted_20_Text"/>
      <text:p text:style-name="Preformatted_20_Text">* Les noms de produits doivent être **strictement identiques**</text:p>
      <text:p text:style-name="Preformatted_20_Text">* Le nom du client doit être présent en **cellule C1**</text:p>
      <text:p text:style-name="Preformatted_20_Text">* Le fichier de correspondance doit être à jour</text:p>
      <text:p text:style-name="Preformatted_20_Text">* Les fichiers Excel doivent être fermés pendant le traitement</text:p>
      <text:p text:style-name="Preformatted_20_Text"/>
      <text:p text:style-name="Preformatted_20_Text">---</text:p>
      <text:p text:style-name="Preformatted_20_Text"/>
      <text:p text:style-name="P1">Bonnes pratiques</text:p>
      <text:p text:style-name="Preformatted_20_Text"/>
      <text:p text:style-name="Preformatted_20_Text">* Toujours utiliser un modèle de fichier client pour éviter les erreurs</text:p>
      <text:p text:style-name="Preformatted_20_Text">* Tester avec un seul fichier avant un traitement global</text:p>
      <text:p text:style-name="Preformatted_20_Text"/>
      <text:p text:style-name="Preformatted_20_Text">—</text:p>
      <text:p text:style-name="Preformatted_20_Text"/>
      <text:p text:style-name="P2">Fichier de configuration</text:p>
      <text:p text:style-name="P3"/>
      <text:p text:style-name="P3">Le fichier script\config.ini permet de modifier certains comportements du script</text:p>
      <text:p text:style-name="Preformatted_20_Text"/>
      <text:p text:style-name="Preformatted_20_Text">---</text:p>
      <text:p text:style-name="Preformatted_20_Text"/>
      <text:p text:style-name="P1">En cas de problème</text:p>
      <text:p text:style-name="Preformatted_20_Text"/>
      <text:p text:style-name="Preformatted_20_Text">Si un client ou un produit n’apparaît pas :</text:p>
      <text:p text:style-name="Preformatted_20_Text"/>
      <text:p text:style-name="Preformatted_20_Text">* Vérifier l’orthographe</text:p>
      <text:p text:style-name="Preformatted_20_Text">* Vérifier le fichier `Correspondance_clients.csv`</text:p>
      <text:p text:style-name="Preformatted_20_Text">* Vérifier que le fichier client est bien dans le dossier `clients`</text:p>
      <text:p text:style-name="Preformatted_20_Text">* Contactez zoso85@hotmail.fr en cas de problème</text:p>
      <text:p text:style-name="Preformatted_20_Text"/>
      <text:p text:style-name="Preformatted_20_Text">---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4-29T09:17:40.339244204</dc:date>
    <meta:editing-duration>PT4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8" meta:word-count="406" meta:character-count="2588" meta:non-whitespace-character-count="2245"/>
  </office:meta>
</office:document-meta>
</file>