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72" style:master-page-name="MasterPage2" style:family="paragraph" style:name="P4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family="text" style:name="T41">
      <style:text-properties fo:font-size="12pt" style:font-size-complex="12pt"/>
    </style:style>
    <style:style style:family="text" style:name="T42">
      <style:text-properties fo:font-size="12pt" style:font-size-complex="12pt"/>
    </style:style>
    <style:style style:parent-style-name="672" style:family="paragraph" style:name="P4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4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4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4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4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4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4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4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4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family="text" style:name="T43">
      <style:text-properties fo:font-size="12pt" style:font-size-complex="12pt"/>
    </style:style>
    <style:style style:family="text" style:name="T44">
      <style:text-properties fo:font-size="12pt" style:font-size-complex="12pt"/>
    </style:style>
    <style:style style:parent-style-name="672" style:family="paragraph" style:name="P5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5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5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5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5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5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5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5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5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5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6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6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6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family="text" style:name="T45">
      <style:text-properties fo:font-size="12pt" style:font-size-complex="12pt"/>
    </style:style>
    <style:style style:family="text" style:name="T46">
      <style:text-properties fo:font-size="12pt" style:font-size-complex="12pt"/>
    </style:style>
    <style:style style:parent-style-name="672" style:family="paragraph" style:name="P6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6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6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6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6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6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6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7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7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7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7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7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7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family="text" style:name="T47">
      <style:text-properties fo:font-size="12pt" style:font-size-complex="12pt"/>
    </style:style>
    <style:style style:family="text" style:name="T48">
      <style:text-properties fo:font-size="12pt" style:font-size-complex="12pt"/>
    </style:style>
    <style:style style:parent-style-name="672" style:family="paragraph" style:name="P7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7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7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7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8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8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8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8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8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8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8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8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family="text" style:name="T49">
      <style:text-properties fo:font-size="12pt" style:font-size-complex="12pt"/>
    </style:style>
    <style:style style:family="text" style:name="T50">
      <style:text-properties fo:font-size="12pt" style:font-size-complex="12pt"/>
    </style:style>
    <style:style style:parent-style-name="672" style:family="paragraph" style:name="P8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8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9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9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9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9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9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9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9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9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9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9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0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0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0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0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0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0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0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0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0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0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1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1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1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parent-style-name="672" style:family="paragraph" style:name="P11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1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1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1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family="text" style:name="T54">
      <style:text-properties fo:font-size="12pt" style:font-size-complex="12pt"/>
    </style:style>
    <style:style style:family="text" style:name="T55">
      <style:text-properties fo:font-size="12pt" style:font-size-complex="12pt"/>
    </style:style>
    <style:style style:parent-style-name="672" style:family="paragraph" style:name="P11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1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1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2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2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2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2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2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2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family="text" style:name="T56">
      <style:text-properties fo:font-size="12pt" style:font-size-complex="12pt"/>
    </style:style>
    <style:style style:family="text" style:name="T57">
      <style:text-properties fo:font-size="12pt" style:font-size-complex="12pt"/>
    </style:style>
    <style:style style:parent-style-name="672" style:family="paragraph" style:name="P12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2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2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2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3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3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3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family="text" style:name="T58">
      <style:text-properties fo:font-size="12pt" style:font-size-complex="12pt"/>
    </style:style>
    <style:style style:family="text" style:name="T59">
      <style:text-properties fo:font-size="12pt" style:font-size-complex="12pt"/>
    </style:style>
    <style:style style:parent-style-name="672" style:family="paragraph" style:name="P13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3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3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3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3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3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family="text" style:name="T60">
      <style:text-properties fo:font-size="12pt" style:font-size-complex="12pt"/>
    </style:style>
    <style:style style:family="text" style:name="T61">
      <style:text-properties fo:font-size="12pt" style:font-size-complex="12pt"/>
    </style:style>
    <style:style style:parent-style-name="672" style:family="paragraph" style:name="P13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40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41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42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43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44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45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46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47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48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  <style:style style:parent-style-name="672" style:family="paragraph" style:name="P149">
      <style:paragraph-properties/>
      <style:text-properties fo:color="#000000" fo:font-family="Liberation Mono" style:font-family-asian="Noto Sans Mono CJK SC" style:font-family-complex="Liberation Mono" fo:font-size="10pt" style:font-size-complex="10pt" fo:language="fr" style:language-complex="hi" fo:country="FR" style:country-complex="IN"/>
    </style:style>
  </office:automatic-styles>
  <office:body>
    <office:text text:use-soft-page-breaks="true">
      <text:p text:style-name="P40"><text:span text:style-name="T41">Centralisation des commandes</text:span><text:span text:style-name="T42"/></text:p>
      <text:p text:style-name="P41"><text:span/><text:span/></text:p>
      <text:p text:style-name="P42"><text:span>Objectif</text:span><text:span/></text:p>
      <text:p text:style-name="P43"><text:span/><text:span/></text:p>
      <text:p text:style-name="P44"><text:span>Ce programme permet de **regrouper automatiquement les commandes de plusieurs clients** à partir de fichiers Excel (`.xlsx`) situés dans le dossier `clients`, vers un fichier unique :</text:span><text:span/></text:p>
      <text:p text:style-name="P45"><text:span>**`Commandes.xlsx`**</text:span><text:span/></text:p>
      <text:p text:style-name="P46"><text:span/><text:span/></text:p>
      <text:p text:style-name="P47"><text:span>---</text:span><text:span/></text:p>
      <text:p text:style-name="P48"><text:span/><text:span/></text:p>
      <text:p text:style-name="P49"><text:span text:style-name="T43">Fonctionnement général</text:span><text:span text:style-name="T44"/></text:p>
      <text:p text:style-name="P50"><text:span/><text:span/></text:p>
      <text:p text:style-name="P51"><text:span>Le script analyse chaque fichier client et :</text:span><text:span/></text:p>
      <text:p text:style-name="P52"><text:span/><text:span/></text:p>
      <text:p text:style-name="P53"><text:span>1. **Recherche les produits** présents dans leurs tableaux</text:span><text:span/></text:p>
      <text:p text:style-name="P54"><text:span>2. **Associe ces produits** avec ceux du fichier `Commandes.xlsx`</text:span><text:span/></text:p>
      <text:p text:style-name="P55"><text:span>3. **Ajoute les quantités** dans les bonnes colonnes correspondant à chaque client</text:span><text:span/></text:p>
      <text:p text:style-name="P56"><text:span/><text:span/></text:p>
      <text:p text:style-name="P57"><text:span>Le programme ne dépend pas de l’emplacement des produits dans les tableaux :</text:span><text:span/></text:p>
      <text:p text:style-name="P58"><text:span>il parcourt toutes les cellules pour trouver les correspondances.</text:span><text:span/></text:p>
      <text:p text:style-name="P59"><text:span/><text:span/></text:p>
      <text:p text:style-name="P60"><text:span>---</text:span><text:span/></text:p>
      <text:p text:style-name="P61"><text:span/><text:span/></text:p>
      <text:p text:style-name="P62"><text:span text:style-name="T45">Gestion des produits</text:span><text:span text:style-name="T46"/></text:p>
      <text:p text:style-name="P63"><text:span/><text:span/></text:p>
      <text:p text:style-name="P64"><text:span>* Les produits sont identifiés **par leur nom**</text:span><text:span/></text:p>
      <text:p text:style-name="P65"><text:span>* Il est donc **essentiel que les noms soient strictement identiques** :</text:span><text:span/></text:p>
      <text:p text:style-name="P66"><text:span/><text:span/></text:p>
      <text:p text:style-name="P67"><text:span><text:s text:c="2"/>* même orthographe</text:span><text:span/></text:p>
      <text:p text:style-name="P68"><text:span><text:s text:c="2"/>* mêmes majuscules / minuscules</text:span><text:span/></text:p>
      <text:p text:style-name="P69"><text:span/><text:span/></text:p>
      <text:p text:style-name="P70"><text:span>Vous pouvez ajouter de nouveaux produits dans les fichiers clients</text:span><text:span/></text:p>
      <text:p text:style-name="P71"><text:span>à condition qu’ils existent aussi dans `Commandes.xlsx`</text:span><text:span/></text:p>
      <text:p text:style-name="P72"><text:span/><text:span/></text:p>
      <text:p text:style-name="P73"><text:span>---</text:span><text:span/></text:p>
      <text:p text:style-name="P74"><text:span/><text:span/></text:p>
      <text:p text:style-name="P75"><text:span text:style-name="T47">Gestion des clients</text:span><text:span text:style-name="T48"/></text:p>
      <text:p text:style-name="P76"><text:span/><text:span/></text:p>
      <text:p text:style-name="P77"><text:span>Chaque fichier client correspond à une colonne dans `Commandes.xlsx`.</text:span><text:span/></text:p>
      <text:p text:style-name="P78"><text:span/><text:span/></text:p>
      <text:p text:style-name="P79"><text:span>Le programme fonctionne ainsi :</text:span><text:span/></text:p>
      <text:p text:style-name="P80"><text:span/><text:span/></text:p>
      <text:p text:style-name="P81"><text:span>1. Il lit le nom du client dans la cellule **C1** du fichier client</text:span><text:span/></text:p>
      <text:p text:style-name="P82"><text:span>2. Il cherche son **abréviation** dans la première ligne de `Commandes.xlsx`</text:span><text:span/></text:p>
      <text:p text:style-name="P83"><text:span>3. Il utilise un fichier de correspondance pour faire le lien</text:span><text:span/></text:p>
      <text:p text:style-name="P84"><text:span/><text:span/></text:p>
      <text:p text:style-name="P85"><text:span>---</text:span><text:span/></text:p>
      <text:p text:style-name="P86"><text:span/><text:span/></text:p>
      <text:p text:style-name="P87"><text:span text:style-name="T49">Fichier de correspondance</text:span><text:span text:style-name="T50"/></text:p>
      <text:p text:style-name="P88"><text:span/><text:span/></text:p>
      <text:p text:style-name="P89"><text:span>Le lien entre :</text:span><text:span/></text:p>
      <text:p text:style-name="P90"><text:span/><text:span/></text:p>
      <text:p text:style-name="P91"><text:span>* nom complet du client</text:span><text:span/></text:p>
      <text:p text:style-name="P92"><text:span>* abréviation utilisée dans `Commandes.xlsx`</text:span><text:span/></text:p>
      <text:p text:style-name="P93"><text:span/><text:span/></text:p>
      <text:p text:style-name="P94"><text:span>est défini dans le fichier :</text:span><text:span/></text:p>
      <text:p text:style-name="P95"><text:span/><text:span/></text:p>
      <text:p text:style-name="P96"><text:span>```</text:span><text:span/></text:p>
      <text:p text:style-name="P97"><text:span>script/Correspondance_clients.csv</text:span><text:span/></text:p>
      <text:p text:style-name="P98"><text:span>```</text:span><text:span/></text:p>
      <text:p text:style-name="P99"><text:span/><text:span/></text:p>
      <text:p text:style-name="P100"><text:span>Vous pouvez :</text:span><text:span/></text:p>
      <text:p text:style-name="P101"><text:span/><text:span/></text:p>
      <text:p text:style-name="P102"><text:span>* Ajouter un client</text:span><text:span/></text:p>
      <text:p text:style-name="P103"><text:span>* Modifier un nom ou une abréviation</text:span><text:span/></text:p>
      <text:p text:style-name="P104"><text:span>* Supprimer un client</text:span><text:span/></text:p>
      <text:p text:style-name="P105"><text:span/><text:span/></text:p>
      <text:p text:style-name="P106"><text:span>Ce fichier peut être modifié simplement avec le Bloc-notes.</text:span><text:span/></text:p>
      <text:p text:style-name="P107"><text:span/><text:span/></text:p>
      <text:p text:style-name="P108"><text:span>---</text:span><text:span/></text:p>
      <text:p text:style-name="P109"><text:span/><text:span/></text:p>
      <text:p text:style-name="P110"><text:span>PROTECTION</text:span><text:span/></text:p>
      <text:p text:style-name="P111"><text:span/><text:span/><text:span/></text:p>
      <text:p text:style-name="P112"><text:span text:style-name="T51">Les cellules (en dehors des cellules « quantité » que le client peut modifier) des tableaux clients sont automatiquement protégées en écriture.</text:span><text:span text:style-name="T52"/><text:span text:style-name="T53"/></text:p>
      <text:p text:style-name="P113"><text:span/><text:span/></text:p>
      <text:p text:style-name="P114"><text:span>---</text:span><text:span/></text:p>
      <text:p text:style-name="P115"><text:span/><text:span/></text:p>
      <text:p text:style-name="P116"><text:span text:style-name="T54">Points importants</text:span><text:span text:style-name="T55"/></text:p>
      <text:p text:style-name="P117"><text:span/><text:span/></text:p>
      <text:p text:style-name="P118"><text:span>* Les noms de produits doivent être **strictement identiques**</text:span><text:span/></text:p>
      <text:p text:style-name="P119"><text:span>* Le nom du client doit être présent en **cellule C1**</text:span><text:span/></text:p>
      <text:p text:style-name="P120"><text:span>* Le fichier de correspondance doit être à jour</text:span><text:span/></text:p>
      <text:p text:style-name="P121"><text:span>* Les fichiers Excel doivent être fermés pendant le traitement</text:span><text:span/></text:p>
      <text:p text:style-name="P122"><text:span/><text:span/></text:p>
      <text:p text:style-name="P123"><text:span>---</text:span><text:span/></text:p>
      <text:p text:style-name="P124"><text:span/><text:span/></text:p>
      <text:p text:style-name="P125"><text:span text:style-name="T56">Bonnes pratiques</text:span><text:span text:style-name="T57"/></text:p>
      <text:p text:style-name="P126"><text:span/><text:span/></text:p>
      <text:p text:style-name="P127"><text:span>* Toujours utiliser un modèle de fichier client pour éviter les erreurs</text:span><text:span/></text:p>
      <text:p text:style-name="P128"><text:span>* Tester avec un seul fichier avant un traitement global</text:span><text:span/></text:p>
      <text:p text:style-name="P129"><text:span/><text:span/></text:p>
      <text:p text:style-name="P130"><text:span>—</text:span><text:span/></text:p>
      <text:p text:style-name="P131"><text:span/><text:span/></text:p>
      <text:p text:style-name="P132"><text:span text:style-name="T58">Fichier de configuration</text:span><text:span text:style-name="T59"/></text:p>
      <text:p text:style-name="P133"><text:span/><text:span/></text:p>
      <text:p text:style-name="P134"><text:span>Le fichier script\config.ini permet de modifier certains comportements du script</text:span><text:span/></text:p>
      <text:p text:style-name="P135"><text:span/><text:span/></text:p>
      <text:p text:style-name="P136"><text:span>---</text:span><text:span/></text:p>
      <text:p text:style-name="P137"><text:span/><text:span/></text:p>
      <text:p text:style-name="P138"><text:span text:style-name="T60">En cas de problème</text:span><text:span text:style-name="T61"/></text:p>
      <text:p text:style-name="P139"><text:span/><text:span/></text:p>
      <text:p text:style-name="P140"><text:span>Si un client ou un produit n’apparaît pas :</text:span><text:span/></text:p>
      <text:p text:style-name="P141"><text:span/><text:span/></text:p>
      <text:p text:style-name="P142"><text:span>* Vérifier l’orthographe</text:span><text:span/></text:p>
      <text:p text:style-name="P143"><text:span>* Vérifier le fichier `Correspondance_clients.csv`</text:span><text:span/></text:p>
      <text:p text:style-name="P144"><text:span>* Vérifier que le fichier client est bien dans le dossier `clients`</text:span><text:span/></text:p>
      <text:p text:style-name="P145"><text:span>* Contactez zoso85@hotmail.fr en cas de problème</text:span><text:span/></text:p>
      <text:p text:style-name="P146"><text:span/><text:span/></text:p>
      <text:p text:style-name="P147"><text:span>---</text:span><text:span/></text:p>
      <text:p text:style-name="P148"><text:span/><text:span/></text:p>
      <text:p text:style-name="P149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</style:style>
    <style:style style:parent-style-name="138" style:display-name="Heading 1" style:family="paragraph" style:name="13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138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138" style:display-name="Heading 3" style:family="paragraph" style:name="141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138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8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8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138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38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38" style:display-name="List Paragraph" style:family="paragraph" style:name="165">
      <style:paragraph-properties fo:margin-left="1.27cm" style:contextual-spacing="true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138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665">
      <style:paragraph-properties/>
      <style:text-properties fo:color="#000000" fo:font-family="Liberation Serif" style:font-family-asian="Noto Serif CJK SC" style:font-family-complex="FreeSans" fo:font-size="12pt" style:font-size-complex="12pt" fo:language="fr" style:language-complex="hi" fo:country="FR" style:country-complex="IN"/>
    </style:style>
    <style:style style:parent-style-name="665" style:display-name="Standard" style:family="paragraph" style:name="666">
      <style:paragraph-properties/>
      <style:text-properties/>
    </style:style>
    <style:style style:parent-style-name="666" style:display-name="Heading" style:family="paragraph" style:name="667">
      <style:paragraph-properties fo:margin-top="12pt" fo:margin-bottom="6pt"/>
      <style:text-properties fo:font-family="Liberation Sans" style:font-family-asian="Noto Sans CJK SC" style:font-family-complex="FreeSans" fo:font-size="14pt" style:font-size-complex="14pt"/>
    </style:style>
    <style:style style:parent-style-name="666" style:display-name="Text body" style:family="paragraph" style:name="668">
      <style:paragraph-properties fo:line-height="115%" fo:margin-top="0pt" fo:margin-bottom="7pt"/>
    </style:style>
    <style:style style:parent-style-name="668" style:display-name="List" style:family="paragraph" style:name="669">
      <style:paragraph-properties/>
      <style:text-properties style:font-family-complex="FreeSans"/>
    </style:style>
    <style:style style:parent-style-name="666" style:display-name="Caption" style:family="paragraph" style:name="670">
      <style:paragraph-properties fo:margin-top="6pt" fo:margin-bottom="6pt"/>
      <style:text-properties style:font-family-complex="FreeSans" fo:font-size="12pt" style:font-size-complex="12pt" fo:font-style="italic"/>
    </style:style>
    <style:style style:parent-style-name="666" style:display-name="Index" style:family="paragraph" style:name="671">
      <style:paragraph-properties/>
      <style:text-properties style:font-family-complex="FreeSans"/>
    </style:style>
    <style:style style:parent-style-name="666" style:display-name="Preformatted Text" style:family="paragraph" style:name="672">
      <style:paragraph-properties fo:margin-top="0pt" fo:margin-bottom="0pt"/>
      <style:text-properties fo:font-family="Liberation Mono" style:font-family-asian="Noto Sans Mono CJK SC" style:font-family-complex="Liberation Mono" fo:font-size="10pt" style:font-size-complex="10pt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